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language="zxx" fo:country="none" fo:font-weight="bold" officeooo:rsid="007b0619" officeooo:paragraph-rsid="007b0619" style:font-size-asian="16pt" style:language-asian="zxx" style:country-asian="none" style:font-weight-asian="bold" style:font-size-complex="16pt" style:language-complex="zxx" style:country-complex="none" style:font-weight-complex="bold"/>
    </style:style>
    <style:style style:name="P2" style:family="paragraph" style:parent-style-name="Footer">
      <style:paragraph-properties fo:text-align="center" style:justify-single-word="false"/>
      <style:text-properties fo:font-size="16pt" officeooo:rsid="00088266" officeooo:paragraph-rsid="00088266" style:font-size-asian="16pt" style:font-size-complex="16pt"/>
    </style:style>
    <style:style style:name="P3" style:family="paragraph" style:parent-style-name="Standard">
      <style:text-properties fo:language="zxx" fo:country="none" style:language-asian="zxx" style:country-asian="none" style:language-complex="zxx" style:country-complex="none"/>
    </style:style>
    <style:style style:name="P4" style:family="paragraph" style:parent-style-name="Standard">
      <style:text-properties fo:font-size="96pt" fo:language="zxx" fo:country="none" officeooo:rsid="000d0c9d" officeooo:paragraph-rsid="000d0c9d" style:font-size-asian="84pt" style:language-asian="zxx" style:country-asian="none" style:font-size-complex="96pt" style:language-complex="zxx" style:country-complex="none"/>
    </style:style>
    <style:style style:name="P5" style:family="paragraph" style:parent-style-name="Standard">
      <style:text-properties fo:font-size="26pt" fo:language="zxx" fo:country="none" officeooo:rsid="000d0c9d" officeooo:paragraph-rsid="000d0c9d" style:font-size-asian="26pt" style:language-asian="zxx" style:country-asian="none" style:font-size-complex="26pt" style:language-complex="zxx" style:country-complex="none"/>
    </style:style>
    <style:style style:name="P6" style:family="paragraph" style:parent-style-name="Standard">
      <style:paragraph-properties fo:text-align="center" style:justify-single-word="false"/>
      <style:text-properties fo:font-size="26pt" fo:language="zxx" fo:country="none" officeooo:rsid="000d0c9d" officeooo:paragraph-rsid="000d0c9d" style:font-size-asian="26pt" style:language-asian="zxx" style:country-asian="none" style:font-size-complex="26pt" style:language-complex="zxx" style:country-complex="none"/>
    </style:style>
    <style:style style:name="P7" style:family="paragraph" style:parent-style-name="Standard">
      <style:text-properties fo:font-size="48pt" fo:language="zxx" fo:country="none" officeooo:rsid="000d0c9d" officeooo:paragraph-rsid="000d0c9d" style:font-size-asian="42pt" style:language-asian="zxx" style:country-asian="none" style:font-size-complex="48pt" style:language-complex="zxx" style:country-complex="none"/>
    </style:style>
    <style:style style:name="P8" style:family="paragraph" style:parent-style-name="Standard">
      <style:text-properties fo:font-size="24pt" fo:language="zxx" fo:country="none" officeooo:rsid="000d0c9d" officeooo:paragraph-rsid="000d0c9d" style:font-size-asian="21pt" style:language-asian="zxx" style:country-asian="none" style:font-size-complex="24pt" style:language-complex="zxx" style:country-complex="none"/>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zxx" fo:country="none" fo:font-style="normal" fo:text-shadow="none" style:text-underline-style="none" fo:font-weight="bold" officeooo:rsid="00c5ce33" officeooo:paragraph-rsid="00c5ce33"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zxx" fo:country="none" fo:font-style="normal" fo:text-shadow="none" style:text-underline-style="none" fo:font-weight="bold" officeooo:rsid="009d9447" officeooo:paragraph-rsid="009d9447"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zxx" fo:country="none" fo:font-style="normal" fo:text-shadow="none" style:text-underline-style="none" fo:font-weight="bold" officeooo:rsid="00c5ce33" officeooo:paragraph-rsid="00c5ce33"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zxx" fo:country="none" fo:font-style="normal" fo:text-shadow="none" style:text-underline-style="none" fo:font-weight="normal" officeooo:rsid="009d9447" officeooo:paragraph-rsid="009d9447"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zxx" fo:country="none" fo:font-style="normal" fo:text-shadow="none" style:text-underline-style="none" fo:font-weight="normal" officeooo:rsid="00c5ce33" officeooo:paragraph-rsid="00c5ce33"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14" style:family="paragraph" style:parent-style-name="Header">
      <style:paragraph-properties fo:text-align="center" style:justify-single-word="false"/>
      <style:text-properties fo:font-variant="small-caps" fo:font-size="20pt" fo:language="zxx" fo:country="none" fo:font-weight="bold" officeooo:rsid="00d90aca" officeooo:paragraph-rsid="00d90aca" style:font-size-asian="20pt" style:language-asian="zxx" style:country-asian="none" style:font-weight-asian="bold" style:font-size-complex="20pt" style:language-complex="zxx" style:country-complex="none" style:font-weight-complex="bold"/>
    </style:style>
    <style:style style:name="P15" style:family="paragraph" style:parent-style-name="Header">
      <style:paragraph-properties fo:text-align="center" style:justify-single-word="false"/>
      <style:text-properties fo:font-size="16pt" fo:language="zxx" fo:country="none" fo:font-style="italic" fo:font-weight="bold" officeooo:rsid="00d90aca" officeooo:paragraph-rsid="00d90aca" style:font-size-asian="16pt" style:language-asian="zxx" style:country-asian="none" style:font-style-asian="italic" style:font-weight-asian="bold" style:font-size-complex="16pt" style:language-complex="zxx" style:country-complex="none" style:font-style-complex="italic" style:font-weight-complex="bold"/>
    </style:style>
    <style:style style:name="P16" style:family="paragraph" style:parent-style-name="Heading_20_1">
      <style:text-properties fo:language="zxx" fo:country="none" officeooo:rsid="007f0184" officeooo:paragraph-rsid="007f0184" style:language-asian="zxx" style:country-asian="none" style:language-complex="zxx" style:country-complex="none"/>
    </style:style>
    <style:style style:name="P17" style:family="paragraph" style:parent-style-name="Heading_20_1">
      <style:paragraph-properties fo:break-before="page"/>
      <style:text-properties fo:language="zxx" fo:country="none" officeooo:rsid="00d90aca" officeooo:paragraph-rsid="00d90aca" style:language-asian="zxx" style:country-asian="none" style:language-complex="zxx" style:country-complex="none"/>
    </style:style>
    <style:style style:name="P18" style:family="paragraph" style:parent-style-name="Heading_20_1">
      <style:text-properties fo:language="zxx" fo:country="none" officeooo:rsid="00d90aca" officeooo:paragraph-rsid="00d90aca" style:language-asian="zxx" style:country-asian="none" style:language-complex="zxx" style:country-complex="none"/>
    </style:style>
    <style:style style:name="P19" style:family="paragraph" style:parent-style-name="Heading_20_1">
      <style:text-properties fo:language="zxx" fo:country="none" officeooo:rsid="00d9b911" officeooo:paragraph-rsid="00d9b911" style:language-asian="zxx" style:country-asian="none" style:language-complex="zxx" style:country-complex="none"/>
    </style:style>
    <style:style style:name="P20" style:family="paragraph" style:parent-style-name="Heading_20_1">
      <style:text-properties fo:language="zxx" fo:country="none" officeooo:rsid="00d9f32d" officeooo:paragraph-rsid="00d9f32d" style:language-asian="zxx" style:country-asian="none" style:language-complex="zxx" style:country-complex="none"/>
    </style:style>
    <style:style style:name="P21" style:family="paragraph" style:parent-style-name="Heading_20_1">
      <style:text-properties fo:language="zxx" fo:country="none" officeooo:rsid="00da950b" officeooo:paragraph-rsid="00da950b" style:language-asian="zxx" style:country-asian="none" style:language-complex="zxx" style:country-complex="none"/>
    </style:style>
    <style:style style:name="P22" style:family="paragraph" style:parent-style-name="Standard" style:master-page-name="First_20_Page">
      <style:paragraph-properties style:page-number="auto"/>
      <style:text-properties fo:font-size="96pt" fo:language="zxx" fo:country="none" officeooo:rsid="000d0c9d" officeooo:paragraph-rsid="000d0c9d" style:font-size-asian="84pt" style:language-asian="zxx" style:country-asian="none" style:font-size-complex="96pt" style:language-complex="zxx" style:country-complex="none"/>
    </style:style>
    <style:style style:name="P23" style:family="paragraph" style:parent-style-name="Standard" style:list-style-name="L2">
      <style:paragraph-properties fo:text-align="start" style:justify-single-word="false"/>
      <style:text-properties fo:language="zxx" fo:country="none" officeooo:rsid="0014e022" officeooo:paragraph-rsid="0083dc9b" style:language-asian="zxx" style:country-asian="none" style:language-complex="zxx" style:country-complex="none"/>
    </style:style>
    <style:style style:name="P24" style:family="paragraph" style:parent-style-name="Standard" style:list-style-name="L2">
      <style:paragraph-properties fo:text-align="start" style:justify-single-word="false"/>
      <style:text-properties fo:language="zxx" fo:country="none" officeooo:rsid="0014e022" officeooo:paragraph-rsid="0014e022" style:language-asian="zxx" style:country-asian="none" style:language-complex="zxx" style:country-complex="none"/>
    </style:style>
    <style:style style:name="P25" style:family="paragraph" style:parent-style-name="Standard" style:list-style-name="L2">
      <style:paragraph-properties fo:text-align="start" style:justify-single-word="false"/>
      <style:text-properties fo:language="zxx" fo:country="none" officeooo:rsid="0014e022" officeooo:paragraph-rsid="00db6e1d"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zxx" fo:country="none" officeooo:rsid="007b8aa5" officeooo:paragraph-rsid="007b8aa5" style:language-asian="zxx" style:country-asian="none" style:language-complex="zxx" style:country-complex="none"/>
    </style:style>
    <style:style style:name="P27" style:family="paragraph" style:parent-style-name="Standard">
      <style:text-properties fo:language="zxx" fo:country="none" officeooo:rsid="000d0c9d" officeooo:paragraph-rsid="000d0c9d" style:language-asian="zxx" style:country-asian="none" style:language-complex="zxx" style:country-complex="none"/>
    </style:style>
    <style:style style:name="P28" style:family="paragraph" style:parent-style-name="Standard">
      <style:paragraph-properties fo:text-align="justify" style:justify-single-word="false"/>
      <style:text-properties fo:language="zxx" fo:country="none" officeooo:rsid="004662c5" officeooo:paragraph-rsid="004662c5" style:language-asian="zxx" style:country-asian="none" style:language-complex="zxx" style:country-complex="none"/>
    </style:style>
    <style:style style:name="P29" style:family="paragraph" style:parent-style-name="Standard">
      <style:paragraph-properties fo:text-align="center" style:justify-single-word="false"/>
      <style:text-properties fo:font-variant="small-caps" fo:font-size="40pt" fo:language="zxx" fo:country="none" fo:font-weight="bold" officeooo:rsid="00d90aca" officeooo:paragraph-rsid="00d90aca" style:font-size-asian="40pt" style:language-asian="zxx" style:country-asian="none" style:font-weight-asian="bold" style:font-size-complex="40pt" style:language-complex="zxx" style:country-complex="none" style:font-weight-complex="bold"/>
    </style:style>
    <style:style style:name="P30" style:family="paragraph" style:parent-style-name="Standard">
      <style:paragraph-properties fo:text-align="center" style:justify-single-word="false"/>
      <style:text-properties fo:font-size="26pt" fo:language="zxx" fo:country="none" fo:font-style="italic" fo:font-weight="bold" officeooo:rsid="00d8e5dc" officeooo:paragraph-rsid="00d8e5dc" style:font-size-asian="26pt" style:language-asian="zxx" style:country-asian="none" style:font-style-asian="italic" style:font-weight-asian="bold" style:font-size-complex="26pt" style:language-complex="zxx" style:country-complex="none" style:font-style-complex="italic" style:font-weight-complex="bold"/>
    </style:style>
    <style:style style:name="P31" style:family="paragraph" style:parent-style-name="Standard">
      <style:paragraph-properties fo:text-align="center" style:justify-single-word="false"/>
      <style:text-properties fo:font-size="26pt" fo:language="zxx" fo:country="none" fo:font-weight="bold" officeooo:rsid="00d8e5dc" officeooo:paragraph-rsid="00d8e5dc" style:font-size-asian="26pt" style:language-asian="zxx" style:country-asian="none" style:font-weight-asian="bold" style:font-size-complex="26pt" style:language-complex="zxx" style:country-complex="none" style:font-weight-complex="bold"/>
    </style:style>
    <style:style style:name="P32" style:family="paragraph" style:parent-style-name="Text_20_body">
      <style:paragraph-properties fo:text-align="justify" style:justify-single-word="false"/>
      <style:text-properties fo:language="zxx" fo:country="none" officeooo:rsid="0086dd52" officeooo:paragraph-rsid="0086dd52" style:language-asian="zxx" style:country-asian="none" style:language-complex="zxx" style:country-complex="none"/>
    </style:style>
    <style:style style:name="P33" style:family="paragraph" style:parent-style-name="Text_20_body">
      <style:paragraph-properties fo:text-align="justify" style:justify-single-word="false"/>
      <style:text-properties fo:language="zxx" fo:country="none" officeooo:rsid="009912ba" officeooo:paragraph-rsid="009912ba" style:language-asian="zxx" style:country-asian="none" style:language-complex="zxx" style:country-complex="none"/>
    </style:style>
    <style:style style:name="P34" style:family="paragraph" style:parent-style-name="Text_20_body" style:list-style-name="L1">
      <style:paragraph-properties fo:text-align="justify" style:justify-single-word="false"/>
      <style:text-properties fo:language="zxx" fo:country="none" officeooo:rsid="009912ba" officeooo:paragraph-rsid="009912ba" style:language-asian="zxx" style:country-asian="none" style:language-complex="zxx" style:country-complex="none"/>
    </style:style>
    <style:style style:name="P35" style:family="paragraph" style:parent-style-name="Text_20_body">
      <style:paragraph-properties fo:text-align="justify" style:justify-single-word="false"/>
      <style:text-properties fo:language="zxx" fo:country="none" officeooo:rsid="009912ba" officeooo:paragraph-rsid="0098c72b" style:language-asian="zxx" style:country-asian="none" style:language-complex="zxx" style:country-complex="none"/>
    </style:style>
    <style:style style:name="P36" style:family="paragraph" style:parent-style-name="Text_20_body" style:list-style-name="L3">
      <style:paragraph-properties fo:text-align="justify" style:justify-single-word="false"/>
      <style:text-properties fo:language="zxx" fo:country="none" officeooo:rsid="009912ba" officeooo:paragraph-rsid="0098c72b" style:language-asian="zxx" style:country-asian="none" style:language-complex="zxx" style:country-complex="none"/>
    </style:style>
    <style:style style:name="P37" style:family="paragraph" style:parent-style-name="Text_20_body" style:list-style-name="L1">
      <style:paragraph-properties fo:text-align="justify" style:justify-single-word="false"/>
      <style:text-properties fo:language="zxx" fo:country="none" officeooo:paragraph-rsid="009912ba" style:language-asian="zxx" style:country-asian="none" style:language-complex="zxx" style:country-complex="none"/>
    </style:style>
    <style:style style:name="P38" style:family="paragraph" style:parent-style-name="Text_20_body">
      <style:paragraph-properties fo:text-align="justify" style:justify-single-word="false"/>
      <style:text-properties fo:language="zxx" fo:country="none" officeooo:rsid="006d004e" style:language-asian="zxx" style:country-asian="none" style:language-complex="zxx" style:country-complex="none"/>
    </style:style>
    <style:style style:name="P39" style:family="paragraph" style:parent-style-name="Text_20_body">
      <style:paragraph-properties fo:margin-left="0in" fo:margin-right="0in" fo:text-align="center" style:justify-single-word="false" fo:text-indent="0in" style:auto-text-indent="false"/>
      <style:text-properties fo:language="zxx" fo:country="none" officeooo:rsid="009eedd1" officeooo:paragraph-rsid="009eedd1" style:language-asian="zxx" style:country-asian="none" style:language-complex="zxx" style:country-complex="none"/>
    </style:style>
    <style:style style:name="P40" style:family="paragraph" style:parent-style-name="Text_20_body">
      <style:paragraph-properties fo:margin-left="0in" fo:margin-right="0in" fo:text-align="center" style:justify-single-word="false" fo:text-indent="0in" style:auto-text-indent="false"/>
      <style:text-properties fo:language="zxx" fo:country="none" officeooo:rsid="00cbed44" officeooo:paragraph-rsid="00cbed44" style:language-asian="zxx" style:country-asian="none" style:language-complex="zxx" style:country-complex="none"/>
    </style:style>
    <style:style style:name="P41" style:family="paragraph" style:parent-style-name="Text_20_body">
      <style:paragraph-properties fo:text-align="justify" style:justify-single-word="false"/>
      <style:text-properties fo:language="zxx" fo:country="none" officeooo:rsid="00af842c" officeooo:paragraph-rsid="00aedcbb" style:language-asian="zxx" style:country-asian="none" style:language-complex="zxx" style:country-complex="none"/>
    </style:style>
    <style:style style:name="P42" style:family="paragraph" style:parent-style-name="Text_20_body">
      <style:paragraph-properties fo:text-align="justify" style:justify-single-word="false"/>
      <style:text-properties fo:language="zxx" fo:country="none" officeooo:rsid="00ba8c7b" officeooo:paragraph-rsid="00ba8c7b" style:language-asian="zxx" style:country-asian="none" style:language-complex="zxx" style:country-complex="none"/>
    </style:style>
    <style:style style:name="P43" style:family="paragraph" style:parent-style-name="Text_20_body">
      <style:paragraph-properties fo:text-align="justify" style:justify-single-word="false"/>
      <style:text-properties fo:language="zxx" fo:country="none" officeooo:rsid="00733182"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zxx" fo:country="none" officeooo:rsid="00d90aca" officeooo:paragraph-rsid="00d90aca"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zxx" fo:country="none" fo:font-style="normal" officeooo:rsid="00941f50" officeooo:paragraph-rsid="00941f50" style:language-asian="zxx" style:country-asian="none" style:font-style-asian="normal" style:language-complex="zxx" style:country-complex="none" style:font-style-complex="normal"/>
    </style:style>
    <style:style style:name="P46" style:family="paragraph" style:parent-style-name="Text_20_body">
      <style:paragraph-properties fo:margin-left="0in" fo:margin-right="0in" fo:text-align="center" style:justify-single-word="false" fo:text-indent="0in" style:auto-text-indent="false"/>
      <style:text-properties fo:language="zxx" fo:country="none" fo:font-style="normal" officeooo:rsid="00985d13" officeooo:paragraph-rsid="00985d13" style:language-asian="zxx" style:country-asian="none" style:font-style-asian="normal" style:language-complex="zxx" style:country-complex="none" style:font-style-complex="normal"/>
    </style:style>
    <style:style style:name="P47" style:family="paragraph" style:parent-style-name="Text_20_body">
      <style:paragraph-properties fo:text-align="justify" style:justify-single-word="false"/>
      <style:text-properties fo:language="zxx" fo:country="none" fo:font-style="normal" officeooo:rsid="00985d13" officeooo:paragraph-rsid="00d90aca" style:language-asian="zxx" style:country-asian="none" style:font-style-asian="normal" style:language-complex="zxx" style:country-complex="none" style:font-style-complex="normal"/>
    </style:style>
    <style:style style:name="T1" style:family="text">
      <style:text-properties fo:font-style="italic" style:font-style-asian="italic" style:font-style-complex="italic"/>
    </style:style>
    <style:style style:name="T2" style:family="text">
      <style:text-properties fo:font-style="italic" officeooo:rsid="00c0c954" style:font-style-asian="italic" style:font-style-complex="italic"/>
    </style:style>
    <style:style style:name="T3" style:family="text">
      <style:text-properties fo:font-style="italic" officeooo:rsid="009912ba"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d90aca" style:font-weight-asian="bold" style:font-weight-complex="bold"/>
    </style:style>
    <style:style style:name="T6" style:family="text">
      <style:text-properties officeooo:rsid="007ffe62"/>
    </style:style>
    <style:style style:name="T7" style:family="text">
      <style:text-properties officeooo:rsid="00815285"/>
    </style:style>
    <style:style style:name="T8" style:family="text">
      <style:text-properties officeooo:rsid="008add94"/>
    </style:style>
    <style:style style:name="T9" style:family="text">
      <style:text-properties officeooo:rsid="00950ed1"/>
    </style:style>
    <style:style style:name="T10" style:family="text">
      <style:text-properties officeooo:rsid="009b145a"/>
    </style:style>
    <style:style style:name="T11" style:family="text">
      <style:text-properties officeooo:rsid="00bbb916"/>
    </style:style>
    <style:style style:name="T12" style:family="text">
      <style:text-properties officeooo:rsid="00bf8b7c"/>
    </style:style>
    <style:style style:name="T13" style:family="text">
      <style:text-properties officeooo:rsid="00c479e6"/>
    </style:style>
    <style:style style:name="T14" style:family="text">
      <style:text-properties officeooo:rsid="00c5ce33"/>
    </style:style>
    <style:style style:name="T15" style:family="text">
      <style:text-properties officeooo:rsid="00c6ecfa"/>
    </style:style>
    <style:style style:name="T16" style:family="text">
      <style:text-properties officeooo:rsid="00c95493"/>
    </style:style>
    <style:style style:name="T17" style:family="text">
      <style:text-properties officeooo:rsid="00cbed44"/>
    </style:style>
    <style:style style:name="T18" style:family="text">
      <style:text-properties officeooo:rsid="00cc31f5"/>
    </style:style>
    <style:style style:name="T19" style:family="text">
      <style:text-properties officeooo:rsid="00cebe34"/>
    </style:style>
    <style:style style:name="T20" style:family="text">
      <style:text-properties officeooo:rsid="00d236f4"/>
    </style:style>
    <style:style style:name="T21" style:family="text">
      <style:text-properties officeooo:rsid="00d4150f"/>
    </style:style>
    <style:style style:name="T22" style:family="text">
      <style:text-properties officeooo:rsid="00d4a661"/>
    </style:style>
    <style:style style:name="T23" style:family="text">
      <style:text-properties officeooo:rsid="00d75b8c"/>
    </style:style>
    <style:style style:name="T24" style:family="text">
      <style:text-properties officeooo:rsid="00d8e5dc"/>
    </style:style>
    <style:style style:name="T25" style:family="text">
      <style:text-properties officeooo:rsid="00d90aca"/>
    </style:style>
    <style:style style:name="T26" style:family="text">
      <style:text-properties officeooo:rsid="009912ba"/>
    </style:style>
    <style:style style:name="T27" style:family="text">
      <style:text-properties officeooo:rsid="00daebf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7"/>
      <text:p text:style-name="P8"/>
      <text:p text:style-name="P5"/>
      <text:p text:style-name="P29">Naslov izveštaja</text:p>
      <text:p text:style-name="P6"/>
      <text:p text:style-name="P30">Ime i prezime jednog studenta</text:p>
      <text:p text:style-name="P30">Ime i prezime drugog studenta</text:p>
      <text:p text:style-name="P6"/>
      <text:p text:style-name="P31">Projektni zadatak: Baze podataka</text:p>
      <text:p text:style-name="P5"/>
      <text:p text:style-name="P1">2<text:span text:style-name="T24">9</text:span>.0<text:span text:style-name="T24">4</text:span>.2026. <text:span text:style-name="T24">(datum završetka izrade izveštaja)</text:span></text:p>
      <text:p text:style-name="P8"/>
      <text:p text:style-name="P4"/>
      <text:h text:style-name="P17" text:outline-level="1"><text:bookmark-start text:name="__RefHeading___Toc1081_3550950347"/>Apstrakt<text:bookmark-end text:name="__RefHeading___Toc1081_3550950347"/></text:h>
      <text:p text:style-name="P26">Apstrakt treba ukratko da opiše cilj samog projekta i ukratko predstavi metolodiju i izazove njegove izrade, pritom ne zalazeći u detalje koji će biti opisani u narednim odeljcima. Dužina treba da bude 200-300 reči i ne treba da prelazi polovinu jedne strane.</text:p>
      <text:p text:style-name="P27"/>
      <text:p text:style-name="P28"><text:span text:style-name="T5">Ključne reči</text:span>: <text:span text:style-name="T25">prva ključna reč, druga ključna reč, treća ključna reč</text:span></text:p>
      <text:p text:style-name="P27"/>
      <text:p text:style-name="P27"/>
      <text:h text:style-name="P17" text:outline-level="1"><text:bookmark-start text:name="__RefHeading___Toc1085_3550950347"/>Uvod<text:bookmark-end text:name="__RefHeading___Toc1085_3550950347"/></text:h>
      <text:p text:style-name="P32">U uvodnom delu izveštaja treba formalnije definisati dodatnu specifikaciju na taj način da naučnicima iz te oblasti bude jasno o čemu se u projektu radi. Ovaj deo ne sme biti samo copy-paste verzija dodatne specifikacije, već zapravo dobro prostudirana verzija iste.</text:p>
      <text:h text:style-name="P18" text:outline-level="1"><text:bookmark-start text:name="__RefHeading___Toc1087_3550950347"/>Metodologija<text:bookmark-end text:name="__RefHeading___Toc1087_3550950347"/></text:h>
      <text:p text:style-name="P47">U okviru metodološkog dela izveštaja treba ukratko opisati pristup rešenju projekta. Treba opisati od čega se to rešenje sastoji (modeli, baza podataka), osvrćući se pritom i na dizajnirane objekte u bazi podataka, kao i indekse. Ukratko treba opisati svaki od tih delova i najbitnije izazove pri njihovoj izradi (na koji način model baze podataka odstupa od teorijskih okvira modelovanja i zašto je to tako urađeno, najznačajnije indekse i objekte u bazi i zašto su oni kao takvi definisani i sl). Jedna od ilustracija u ovom delu rada treba da bude i sam model podataka, izrađen u bilo kom alatu (osim ručno nacrtan i uslikan). Dozvoljeno je čak i da se model podataka zada u obliku skrinšota relacione šeme. Osim te, očekuje se da u ovom delu bude još ilustracija (mada ne postoji numeričko ograničenje za broj ilustracija).</text:p>
      <text:p text:style-name="P47">U nastavku specifikacije zadatka biće zadato kakve ilustracije izveštaj ovog formata treba/može sadržati. Takođe, treba opisati upite koji se "šalju" iz aplikacije ka bazi podataka radi pribavljanja ili traksakcione obrade podataka. Ovaj deo treba da bude opisan u oko 500 reči.</text:p>
      <text:h text:style-name="P19" text:outline-level="1"><text:bookmark-start text:name="__RefHeading___Toc1089_3550950347"/>Alati<text:bookmark-end text:name="__RefHeading___Toc1089_3550950347"/></text:h>
      <text:p text:style-name="P35">U ovom delu potrebno je opisati najbitnije alate korišćene za kreiranje i/ili testiranje baze podataka. Ovaj deo treba da sadrži ukupno 200-300 reči i opisuje uloge najbitnijih alata. Za svaki alat potrebno je navesti i referencu (stavka 11 ovog listinga detaljnije opisuje reference). Potrebno je uključiti barem sledeće alate (ukoliko su korišćeni), s tim što je dozvoljeno opisivati i neke druge:</text:p>
      <text:list xml:id="list2583121481" text:style-name="L3">
        <text:list-item>
          <text:p text:style-name="P36">SQL radno okruženje (referenca je neki od radova sa sajta scholar.google.com na kome je to radno okruženje opisano, potrudite se da pročitate bar neki deo rada koji budete navodili)</text:p>
        </text:list-item>
        <text:list-item>
          <text:p text:style-name="P36">vašu aplikaciju koju ste dizajnirali u sklopu projekta radi testiranja baze podataka (referenca je javni GitHub ili Google Drive link)</text:p>
        </text:list-item>
        <text:list-item>
          <text:p text:style-name="P36">agenta veštačke inteligencije u kontekstu kreiranja podataka u bazi (referenca je dokumentacija alata ili neki naučni rad koji opisuje taj konkretan alat)</text:p>
        </text:list-item>
      </text:list>
      <text:p text:style-name="P44"/>
      <text:h text:style-name="P20" text:outline-level="1"><text:bookmark-start text:name="__RefHeading___Toc1091_3550950347"/><text:soft-page-break/>Rezultati<text:bookmark-end text:name="__RefHeading___Toc1091_3550950347"/></text:h>
      <text:p text:style-name="P38">Ovaj deo treba da bude dug 300-400 reči i u njemu treba, za upite opisane u Metodologiji, opisati rezultate tih upita. Pritom je potrebno priložiti i opisati priložene ilustracije. Ilustracije mogu biti skrinšotovi aplikacije (u slučaju da se dešava pribavljanje podataka iz baze), ali i zanimljiva grafička predstava (kreirana pomoću alata veštačke inteligencije, pošto još uvek niste učili matplotlib) nekih od rezultata (npr. grafik kojim se poredi uspešnost eksperimenata vezanih za svaki od teorijskih okvira).</text:p>
      <text:h text:style-name="P20" text:outline-level="1"><text:bookmark-start text:name="__RefHeading___Toc1091_35509503471"/>Analiza grešaka<text:bookmark-end text:name="__RefHeading___Toc1091_35509503471"/></text:h>
      <text:p text:style-name="P41">U ovom delu, dugom oko 500 reči, potrebno je opisivati izazove koji su nastali prilikom izrade projekta, kao i kako su oni uticali na konačne rezultate. Npr. možete opisivati kako ste denormalizovali bazu podataka kako bi unos bio lakši, ali ste pritom dozvolili da neke od anomalija unosa (koje ste kasnije, naravno, rešili aplikacijom – ne samom bazom podataka). Vredi pomenuti još jednom da se izveštaj piše o bazi podataka, tako da i ovaj deo treba da bude vezan upravo za nju.</text:p>
      <text:h text:style-name="P21" text:outline-level="1"><text:bookmark-start text:name="__RefHeading___Toc1091_35509503472"/>Diskusija<text:bookmark-end text:name="__RefHeading___Toc1091_35509503472"/></text:h>
      <text:p text:style-name="P42">Ovaj kratki deo treba da rezimira dosad opisane metode, alate, rezultate i greške u oko 200 reči. Takođe, potrebno je u ovom delu dokazati validnost modela podataka, pritom se ne fokusirajući na entitete i veze, već na upotrebljivost modela i podataka – na to što ste uspeli da implementirate aplikaciju koja se "kači" na bazu podataka <text:span text:style-name="T27">osmišljenog modela</text:span>.</text:p>
      <text:h text:style-name="P21" text:outline-level="1"><text:bookmark-start text:name="__RefHeading___Toc1093_3550950347"/>Zaključak<text:bookmark-end text:name="__RefHeading___Toc1093_3550950347"/></text:h>
      <text:p text:style-name="P43">Ukratko još jednom u zaključku treba navesti cilj projekta (oko 20 reči) i definisati na koji način se ova baza podataka može proširiti ili izmeniti (tzv. budućnost, eng. future work) tako da podrži i neke kompleksnije ili šire primene (oko 50 reči), a na kraju se osvrnuti i na diskusiju, te reći da je ipak i ova baza podataka već upotrebljiva u određenim aspektima (oko 30 reči).</text:p>
      <text:h text:style-name="P16" text:outline-level="1"><text:bookmark-start text:name="__RefHeading___Toc1095_3550950347"/>Reference<text:bookmark-end text:name="__RefHeading___Toc1095_3550950347"/></text:h>
      <text:list xml:id="list821136751" text:style-name="L2">
        <text:list-item>
          <text:p text:style-name="P23">MyBib Contributors (2019). <text:span text:style-name="T1">Harvard Referencing Generator – FREE – (updated for 2019)</text:span>. [online] MyBib. Available at: <text:a xlink:type="simple" xlink:href="https://www.mybib.com/tools/harvard-referencing-generator" text:style-name="Internet_20_link" text:visited-style-name="Visited_20_Internet_20_Link">https://www.mybib.com/tools/harvard-referencing-generator</text:a>.</text:p>
        </text:list-item>
        <text:list-item>
          <text:p text:style-name="P25">Google (2024). <text:span text:style-name="T1">Google Scholar</text:span>. [online] Google.com. Available at: <text:a xlink:type="simple" xlink:href="https://scholar.google.com/" text:style-name="Internet_20_link" text:visited-style-name="Visited_20_Internet_20_Link">https://scholar.google.com</text:a>.‌‌</text:p>
        </text:list-item>
      </text:list>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115%" fo:text-indent="0.3in"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small-caps" fo:font-size="20pt" fo:language="zxx" fo:country="none" fo:font-weight="bold" officeooo:rsid="00d90aca" officeooo:paragraph-rsid="00d90aca" style:font-size-asian="20pt" style:language-asian="zxx" style:country-asian="none" style:font-weight-asian="bold" style:font-size-complex="20pt" style:language-complex="zxx" style:country-complex="none" style:font-weight-complex="bold"/>
    </style:style>
    <style:style style:name="MP2" style:family="paragraph" style:parent-style-name="Header">
      <style:paragraph-properties fo:text-align="center" style:justify-single-word="false"/>
      <style:text-properties fo:font-size="16pt" fo:language="zxx" fo:country="none" fo:font-style="italic" fo:font-weight="bold" officeooo:rsid="00d90aca" officeooo:paragraph-rsid="00d90aca" style:font-size-asian="16pt" style:language-asian="zxx" style:country-asian="none" style:font-style-asian="italic" style:font-weight-asian="bold" style:font-size-complex="16pt" style:language-complex="zxx" style:country-complex="none" style:font-style-complex="italic" style:font-weight-complex="bold"/>
    </style:style>
    <style:style style:name="MP3" style:family="paragraph" style:parent-style-name="Footer">
      <style:paragraph-properties fo:text-align="center" style:justify-single-word="false"/>
      <style:text-properties fo:font-size="16pt" officeooo:rsid="00088266" officeooo:paragraph-rsid="00088266" style:font-size-asian="16pt" style:font-size-complex="16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aslov izveštaja</text:p>
        <text:p text:style-name="MP2">Ime i prezime prvog studenta, Ime i prezime drugog studenta</text:p>
        <text:p text:style-name="Horizontal_20_Line"/>
      </style:header>
      <style:footer>
        <text:p text:style-name="Horizontal_20_Line"/>
        <text:p text:style-name="MP3">( <text:page-number text:select-page="current">4</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9T10:18:29.534979844</meta:creation-date>
    <dc:date>2026-04-29T21:26:09.813732226</dc:date>
    <meta:editing-duration>P1DT5H41M39S</meta:editing-duration>
    <meta:editing-cycles>195</meta:editing-cycles>
    <meta:generator>LibreOffice/7.3.7.2$Linux_X86_64 LibreOffice_project/30$Build-2</meta:generator>
    <meta:document-statistic meta:table-count="0" meta:image-count="0" meta:object-count="0" meta:page-count="4" meta:paragraph-count="32" meta:word-count="759" meta:character-count="4886" meta:non-whitespace-character-count="4160"/>
  </office:meta>
</office:document-meta>
</file>